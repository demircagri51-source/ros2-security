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00000029A5B0CEAFF3D77BD22.png" manifest:media-type="image/png"/>
  <manifest:file-entry manifest:full-path="Pictures/100000010000078000000438A998D343130DB086.png" manifest:media-type="image/png"/>
  <manifest:file-entry manifest:full-path="Pictures/10000001000002D8000002068B9619C53B0E5BF0.png" manifest:media-type="image/png"/>
  <manifest:file-entry manifest:full-path="Pictures/10000001000007330000041853F24D74F3B4373E.png" manifest:media-type="image/png"/>
  <manifest:file-entry manifest:full-path="Pictures/10000001000002DC00000206A641EE9EB41D5A98.png" manifest:media-type="image/png"/>
  <manifest:file-entry manifest:full-path="Pictures/10000001000004680000041831E61C77CCACD3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7292in"/>
    </style:style>
    <style:style style:name="Table1.B" style:family="table-column">
      <style:table-column-properties style:column-width="1.3465in"/>
    </style:style>
    <style:style style:name="Table1.C" style:family="table-column">
      <style:table-column-properties style:column-width="1.5556in"/>
    </style:style>
    <style:style style:name="Table1.D" style:family="table-column">
      <style:table-column-properties style:column-width="2.0618in"/>
    </style:style>
    <style:style style:name="Table1.A1" style:family="table-cell">
      <style:table-cell-properties style:vertical-align="middle" fo:padding="0.0194in" fo:border="none"/>
    </style:style>
    <style:style style:name="P1" style:family="paragraph" style:parent-style-name="Table_20_Contents">
      <style:text-properties fo:font-weight="bold"/>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font-weight="bold"/>
    </style:style>
    <style:style style:name="P7" style:family="paragraph" style:parent-style-name="Text_20_body" style:list-style-name="L4"/>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Giriş ve Tehdit Modeli (Threat Model)</text:h>
      <text:p text:style-name="Text_20_body">Bu çalışmanın amacı, ROS2 Humble mimarisi üzerinde çalışan bir robotik manipülatör (UR5e) simülasyonunda, varsayılan (şifresiz) ağ yapılandırmasının yaratacağı fiziksel ve siber riskleri analiz etmek ve DDS-Security (SROS2) ile bu riskleri mitigate (hafifletme) etmektir.</text:p>
      <text:list xml:id="list3799029255" text:style-name="L1">
        <text:list-item>
          <text:p text:style-name="P3"><text:span text:style-name="T1">Tehdit Modeli:</text:span> Saldırgan, ROS2 ağına yerel erişimi olan ancak sistemin kriptografik sertifikalarına sahip olmayan bir "İçeriden Tehdit" (Insider/Rogue Node) olarak varsayılmıştır.</text:p>
        </text:list-item>
        <text:list-item>
          <text:p text:style-name="P3"><text:span text:style-name="T1">Sınırlar (Limitations):</text:span> Bu analiz Gazebo simülasyon ortamında gerçekleştirilmiş olup, donanımsal ağ gecikmelerinden ziyade şifreleme algoritmalarının (AES-256) yazılımsal <draw:frame draw:style-name="fr2" draw:name="Image1" text:anchor-type="char" svg:x="0.1146in" svg:y="2.2209in" svg:width="6.6929in" svg:height="6.2181in" draw:z-index="0"><draw:image xlink:href="Pictures/10000001000004680000041831E61C77CCACD3A9.png" xlink:type="simple" xlink:show="embed" xlink:actuate="onLoad" draw:mime-type="image/png"/></draw:frame>işlem yüküne (Overhead) odaklanmıştır.</text:p>
        </text:list-item>
      </text:list>
      <text:h text:style-name="Heading_20_2" text:outline-level="2">2. Zafiyet Keşfi ve Aktif Sızma Testi (Exploitation)</text:h>
      <text:p text:style-name="Text_20_body">Sistemin varsayılan (Baseline) halinde ağ trafiği Wireshark ile dinlenmiş ve robotun telemetri verilerinin (<text:span text:style-name="Source_20_Text">/joint_states</text:span>) <text:span text:style-name="T1">şifresiz (Plaintext)</text:span> aktığı kanıtlanmıştır.</text:p>
      <text:p text:style-name="Text_20_body"><text:span text:style-name="Source_20_Text"><text:span text:style-name="T2"/></text:span></text:p>
      <text:p text:style-name="Text_20_body"><text:soft-page-break/><text:span text:style-name="Source_20_Text"/></text:p>
      <text:p text:style-name="Text_20_body">Bu zafiyetten faydalanarak ağa yetkisiz bir "Rogue Node" (Kötü Niyetli Düğüm) dahil edilmiştir. Yazılan saldırı scripti, üst düzey planlayıcıyı (MoveIt2) bypass ederek doğrudan <text:span text:style-name="Source_20_Text">/joint_trajectory_controller/joint_trajectory</text:span> kanalına sahte yörünge komutları enjekte etmiştir (Command Injection).</text:p>
      <text:list xml:id="list1415575911" text:style-name="L2">
        <text:list-item>
          <text:p text:style-name="P4"><text:span text:style-name="T1">Sonuç (State Inconsistency):</text:span> Saldırı başarılı olmuş, RViz arayüzü robotu güvenli pozisyonda gösterirken, fiziksel simülasyonda (Gazebo) robotun kontrolü tamamen kaybedilmiş ve sistem kararsız duruma geçmiştir.</text:p>
        </text:list-item>
      </text:list>
      <text:p text:style-name="Text_20_body"><text:span text:style-name="Source_20_Text"><text:span text:style-name="T2"/></text:span></text:p>
      <text:h text:style-name="Heading_20_2" text:outline-level="2">3. Kriptografik Savunma: SROS2 ve Sıfır Güven (Zero Trust)</text:h>
      <text:p text:style-name="Text_20_body">Tespit edilen "Kontrol Kaybı" riskini ortadan kaldırmak için sisteme SROS2 entegre edilmiştir.</text:p>
      <text:list xml:id="list4254820110" text:style-name="L3">
        <text:list-item>
          <text:p text:style-name="P5"><text:span text:style-name="Source_20_Text">ros2 security create_keystore</text:span> ile yerel bir Sertifika Otoritesi (CA) oluşturulmuş ve <text:span text:style-name="Source_20_Text">/a9_master_enclave</text:span> adında bir ana kimlik üretilmiştir.</text:p>
        </text:list-item>
        <text:list-item>
          <text:p text:style-name="P5">Sistem <text:span text:style-name="Source_20_Text">ROS_SECURITY_STRATEGY=Enforce</text:span> parametresiyle başlatılarak "Sıfır Güven" (Zero Trust) mimarisine geçirilmiştir.</text:p>
        </text:list-item>
      </text:list>
      <text:p text:style-name="Text_20_body"><text:span text:style-name="T1">Savunma Doğrulaması (Verification):</text:span> Sistem zırhlı moddayken aynı "Rogue Node" saldırısı tekrarlanmıştır. Yetkisiz düğümün gönderdiği komutlar, DDS-Security Erişim Kontrolü (Access Control) tarafından ağ katmanında reddedilmiş ve robot güvenli durumunu korumuştur. Ayrıca ağ trafiği Wireshark ile tekrar dinlendiğinde, verilerin AES-256-GCM ile tamamen şifrelendiği (Ciphertext) görülmüştür.</text:p>
      <text:p text:style-name="Text_20_body"><draw:frame draw:style-name="fr3" draw:name="Image2" text:anchor-type="char" svg:width="6.6929in" svg:height="3.8055in" draw:z-index="1"><draw:image xlink:href="Pictures/10000001000007330000041853F24D74F3B4373E.png" xlink:type="simple" xlink:show="embed" xlink:actuate="onLoad" draw:mime-type="image/png"/></draw:frame><text:span text:style-name="Source_20_Text"><text:span text:style-name="T2"/></text:span></text:p>
      <text:h text:style-name="Heading_20_2" text:outline-level="2"><text:soft-page-break/>4. Performans ve Kaynak Tüketimi Analizi (Overhead)</text:h>
      <text:p text:style-name="Text_20_body">Güvenlik mimarisinin sistemin gerçek zamanlı çalışma performansına etkisini ölçmek amacıyla, şifresiz (Baseline) ve şifreli (SROS2) durumlar için Python tabanlı özel ölçüm scriptleri (psutil ve ROS2 timer kullanılarak) geliştirilmiştir. Elde edilen veriler aşağıdaki tabloda sunulmuştu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Performans Metriği</text:p>
            </table:table-cell>
            <table:table-cell table:style-name="Table1.A1" office:value-type="string">
              <text:p text:style-name="Table_20_Contents">Şifresiz Sistem (Baseline)</text:p>
            </table:table-cell>
            <table:table-cell table:style-name="Table1.A1" office:value-type="string">
              <text:p text:style-name="Table_20_Contents">Şifreli Sistem (SROS2 Enforce)</text:p>
            </table:table-cell>
            <table:table-cell table:style-name="Table1.A1" office:value-type="string">
              <text:p text:style-name="Table_20_Contents">Kriptografik Ek Yük (Overhead)</text:p>
            </table:table-cell>
          </table:table-row>
        </table:table-header-rows>
        <table:table-row>
          <table:table-cell table:style-name="Table1.A1" office:value-type="string">
            <text:p text:style-name="P1">İletişim Gecikmesi (Latency)</text:p>
          </table:table-cell>
          <table:table-cell table:style-name="Table1.A1" office:value-type="string">
            <text:p text:style-name="Table_20_Contents">5.00 ms</text:p>
          </table:table-cell>
          <table:table-cell table:style-name="Table1.A1" office:value-type="string">
            <text:p text:style-name="Table_20_Contents">6.00 ms</text:p>
          </table:table-cell>
          <table:table-cell table:style-name="Table1.A1" office:value-type="string">
            <text:p text:style-name="P1">+ 1.00 ms</text:p>
          </table:table-cell>
        </table:table-row>
        <table:table-row>
          <table:table-cell table:style-name="Table1.A1" office:value-type="string">
            <text:p text:style-name="P1">İşlemci (CPU) Kullanımı</text:p>
          </table:table-cell>
          <table:table-cell table:style-name="Table1.A1" office:value-type="string">
            <text:p text:style-name="Table_20_Contents">% 61.31</text:p>
          </table:table-cell>
          <table:table-cell table:style-name="Table1.A1" office:value-type="string">
            <text:p text:style-name="Table_20_Contents">% 62.60</text:p>
          </table:table-cell>
          <table:table-cell table:style-name="Table1.A1" office:value-type="string">
            <text:p text:style-name="P1">+ % 1.29</text:p>
          </table:table-cell>
        </table:table-row>
        <table:table-row>
          <table:table-cell table:style-name="Table1.A1" office:value-type="string">
            <text:p text:style-name="P1">Bellek (RAM) Kullanımı</text:p>
          </table:table-cell>
          <table:table-cell table:style-name="Table1.A1" office:value-type="string">
            <text:p text:style-name="Table_20_Contents">% 25.72</text:p>
          </table:table-cell>
          <table:table-cell table:style-name="Table1.A1" office:value-type="string">
            <text:p text:style-name="Table_20_Contents">% 26.02</text:p>
          </table:table-cell>
          <table:table-cell table:style-name="Table1.A1" office:value-type="string">
            <text:p text:style-name="P1">+ % 0.30</text:p>
          </table:table-cell>
        </table:table-row>
        <table:table-row>
          <table:table-cell table:style-name="Table1.A1" office:value-type="string">
            <text:p text:style-name="P1">Ağ Keşfi ve Bağlantı Kurulumu</text:p>
          </table:table-cell>
          <table:table-cell table:style-name="Table1.A1" office:value-type="string">
            <text:p text:style-name="Table_20_Contents">Anında (0 ms)</text:p>
          </table:table-cell>
          <table:table-cell table:style-name="Table1.A1" office:value-type="string">
            <text:p text:style-name="Table_20_Contents">~ 1-2 Saniye</text:p>
          </table:table-cell>
          <table:table-cell table:style-name="Table1.A1" office:value-type="string">
            <text:p text:style-name="P1">Kriptografik El Sıkışma (Handshake)</text:p>
          </table:table-cell>
        </table:table-row>
      </table:table>
      <text:p text:style-name="P2"/>
      <text:p text:style-name="P2"><draw:frame draw:style-name="fr2" draw:name="Image4" text:anchor-type="char" svg:x="0in" svg:y="-0.1043in" svg:width="6.6929in" svg:height="4.7618in" draw:z-index="3"><draw:image xlink:href="Pictures/10000001000002D8000002068B9619C53B0E5BF0.png" xlink:type="simple" xlink:show="embed" xlink:actuate="onLoad" draw:mime-type="image/png"/></draw:frame></text:p>
      <text:p text:style-name="P2"/>
      <text:p text:style-name="Text_20_body"><draw:frame draw:style-name="fr1" draw:name="Image6" text:anchor-type="char" svg:width="7.1319in" svg:height="5.9083in" draw:z-index="5"><draw:image xlink:href="Pictures/100000010000078000000438A998D343130DB086.png" xlink:type="simple" xlink:show="embed" xlink:actuate="onLoad" draw:mime-type="image/png"/></draw:frame><text:soft-page-break/></text:p>
      <text:p text:style-name="Text_20_body"><draw:frame draw:style-name="fr2" draw:name="Image5" text:anchor-type="char" svg:x="-0.1953in" svg:y="2.7075in" svg:width="7.011in" svg:height="4.5453in" draw:z-index="4"><draw:image xlink:href="Pictures/10000001000007400000029A5B0CEAFF3D77BD22.png" xlink:type="simple" xlink:show="embed" xlink:actuate="onLoad" draw:mime-type="image/png"/></draw:frame><text:span text:style-name="T1"/></text:p>
      <text:p text:style-name="Text_20_body"><draw:frame draw:style-name="fr2" draw:name="Image3" text:anchor-type="char" svg:x="-0.1638in" svg:y="-0.1217in" svg:width="6.922in" svg:height="4.7362in" draw:z-index="2"><draw:image xlink:href="Pictures/10000001000002DC00000206A641EE9EB41D5A98.png" xlink:type="simple" xlink:show="embed" xlink:actuate="onLoad" draw:mime-type="image/png"/></draw:frame><text:soft-page-break/><text:span text:style-name="T1"/></text:p>
      <text:p text:style-name="Text_20_body"><text:span text:style-name="T1">Sonuçların Değerlendirilmesi:</text:span> Analiz sonuçları, AES-256 şifrelemesinin CPU üzerinde yalnızca <text:span text:style-name="T1">%1.29'luk</text:span> bir artışa ve iletim süresinde <text:span text:style-name="T1">1 milisaniyelik</text:span> ihmal edilebilir bir gecikmeye neden olduğunu göstermektedir. Tek belirgin performans kaybı, sistemin ilk açılışında sertifikaların doğrulanması (Startup Overhead) sırasında yaşanan 1-2 saniyelik el sıkışma (Handshake) gecikmesidir. Bu durum, SROS2'nin kaynak kısıtlı endüstriyel sistemlerde sürekli operasyon sırasında güvenle kullanılabileceğini kanıtlamaktadır.</text:p>
      <text:h text:style-name="Heading_20_2" text:outline-level="2">5. Operasyonel Değerlendirme ve Sıkılaştırma (Hardening) Önerileri</text:h>
      <text:p text:style-name="Text_20_body">SROS2 her ne kadar ağ düzeyinde kusursuz bir güvenlik sağlasa da, operasyonel açıdan "Anahtar Yönetimi" (Key Management) zorlukları barındırmaktadır. Endüstriyel bir sahada her yeni sensör veya robot eklendiğinde bu sertifikaların güvenli bir şekilde dağıtılması gerekmektedir.</text:p>
      <text:p text:style-name="P2">Minimum Güvenlik Standartları (Baseline) Önerileri:</text:p>
      <text:list xml:id="list3900556242" text:style-name="L4">
        <text:list-item>
          <text:p text:style-name="P7">ROS2 sistemleri asla ortak ağlarda (Public LAN) şifresiz çalıştırılmamalıdır.</text:p>
        </text:list-item>
        <text:list-item>
          <text:p text:style-name="P7">SROS2 konfigürasyonları daima <text:span text:style-name="Source_20_Text">Enforce</text:span> modunda olmalı, yetkisiz düğümlerin "Topic Discovery" (Keşif) yapmasına izin verilmemelidir.</text:p>
        </text:list-item>
        <text:list-item>
          <text:p text:style-name="P7">Kritik sistemlerde fiziksel izolasyon (VLAN) ve kriptografik izolasyon (SROS2) eşzamanlı kullanılmalıdır.</text:p>
        </text:list-item>
      </text:list>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7T22:09:12.639947877</meta:creation-date>
    <dc:date>2026-03-28T21:23:10.969564304</dc:date>
    <meta:editing-duration>PT7M37S</meta:editing-duration>
    <meta:editing-cycles>2</meta:editing-cycles>
    <meta:generator>LibreOffice/7.3.7.2$Linux_X86_64 LibreOffice_project/30$Build-2</meta:generator>
    <meta:document-statistic meta:table-count="1" meta:image-count="6" meta:object-count="0" meta:page-count="6" meta:paragraph-count="42" meta:word-count="499" meta:character-count="4119" meta:non-whitespace-character-count="3670"/>
  </office:meta>
</office:document-meta>
</file>